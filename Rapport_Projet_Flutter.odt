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1cm" fo:margin-left="0.009cm" fo:margin-top="0cm" fo:margin-bottom="0cm" table:align="left" style:writing-mode="page"/>
    </style:style>
    <style:style style:name="Tableau1.A" style:family="table-column">
      <style:table-column-properties style:column-width="3.184cm"/>
    </style:style>
    <style:style style:name="Tableau1.E" style:family="table-column">
      <style:table-column-properties style:column-width="3.18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a3a5c" fo:padding-left="0.106cm" fo:padding-right="0.106cm" fo:padding-top="0.053cm" fo:padding-bottom="0.053cm" fo:border="0.5pt solid #000000">
        <style:background-image/>
      </style:table-cell-properties>
    </style:style>
    <style:style style:name="Tableau1.A2" style:family="table-cell">
      <style:table-cell-properties fo:background-color="#ebf3fb" fo:padding-left="0.106cm" fo:padding-right="0.106cm" fo:padding-top="0.035cm" fo:padding-bottom="0.035cm" fo:border="0.5pt solid #000000">
        <style:background-image/>
      </style:table-cell-properties>
    </style:style>
    <style:style style:name="Tableau1.A3" style:family="table-cell">
      <style:table-cell-properties fo:background-color="#ffffff" fo:padding-left="0.106cm" fo:padding-right="0.106cm" fo:padding-top="0.035cm" fo:padding-bottom="0.035cm" fo:border="0.5pt solid #000000">
        <style:background-image/>
      </style:table-cell-properties>
    </style:style>
    <style:style style:name="Tableau2" style:family="table">
      <style:table-properties style:width="15.921cm" fo:margin-left="0.009cm" fo:margin-top="0cm" fo:margin-bottom="0cm" table:align="left" style:writing-mode="page"/>
    </style:style>
    <style:style style:name="Tableau2.A" style:family="table-column">
      <style:table-column-properties style:column-width="5.306cm"/>
    </style:style>
    <style:style style:name="Tableau2.B" style:family="table-column">
      <style:table-column-properties style:column-width="5.308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a3a5c" fo:padding-left="0.106cm" fo:padding-right="0.106cm" fo:padding-top="0.053cm" fo:padding-bottom="0.053cm" fo:border="0.5pt solid #000000">
        <style:background-image/>
      </style:table-cell-properties>
    </style:style>
    <style:style style:name="Tableau2.A2" style:family="table-cell">
      <style:table-cell-properties fo:background-color="#ebf3fb" fo:padding-left="0.106cm" fo:padding-right="0.106cm" fo:padding-top="0.035cm" fo:padding-bottom="0.035cm" fo:border="0.5pt solid #000000">
        <style:background-image/>
      </style:table-cell-properties>
    </style:style>
    <style:style style:name="Tableau2.A3" style:family="table-cell">
      <style:table-cell-properties fo:background-color="#ffffff" fo:padding-left="0.106cm" fo:padding-right="0.106cm" fo:padding-top="0.035cm" fo:padding-bottom="0.035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0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4" style:family="paragraph" style:parent-style-name="Heading_20_1">
      <style:paragraph-properties fo:margin-top="0.494cm" fo:margin-bottom="0.247cm" style:contextual-spacing="false"/>
    </style:style>
    <style:style style:name="P5" style:family="paragraph" style:parent-style-name="Standard">
      <style:paragraph-properties fo:margin-top="0.018cm" fo:margin-bottom="0.106cm" style:contextual-spacing="false" fo:padding-left="0cm" fo:padding-right="0cm" fo:padding-top="0cm" fo:padding-bottom="0.035cm" fo:border-left="none" fo:border-right="none" fo:border-top="none" fo:border-bottom="0.51pt solid #1a3a5c"/>
    </style:style>
    <style:style style:name="P6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</style:style>
    <style:style style:name="P7" style:family="paragraph" style:parent-style-name="Standard">
      <style:paragraph-properties fo:margin-top="0.035cm" fo:margin-bottom="0.035cm" style:contextual-spacing="false"/>
    </style:style>
    <style:style style:name="P8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  <style:text-properties officeooo:paragraph-rsid="001aaaba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  <style:text-properties style:font-name="Arial" fo:font-size="10.5pt" officeooo:paragraph-rsid="001aaaba" style:font-name-asian="Arial2" style:font-size-asian="10.5pt" style:font-name-complex="Arial2" style:font-size-complex="10.5pt"/>
    </style:style>
    <style:style style:name="P11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  <style:text-properties style:font-name="Arial" fo:font-size="12pt" fo:font-weight="bold" officeooo:paragraph-rsid="001aaaba" style:font-name-asian="Arial2" style:font-size-asian="12pt" style:font-weight-asian="bold" style:font-name-complex="Arial2" style:font-size-complex="12pt" style:font-weight-complex="bold"/>
    </style:style>
    <style:style style:name="P12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  <style:text-properties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3" style:family="paragraph" style:parent-style-name="Standard">
      <style:paragraph-properties fo:margin-top="0.071cm" fo:margin-bottom="0.071cm" style:contextual-spacing="false" fo:line-height="117%" fo:text-align="justify" style:justify-single-word="false" loext:word-spacing-minimum="75%" loext:word-spacing-maximum="133%"/>
      <style:text-properties style:font-name="Arial" fo:font-size="10.5pt" style:font-name-asian="Arial2" style:font-size-asian="10.5pt" style:font-name-complex="Arial2" style:font-size-complex="10.5pt"/>
    </style:style>
    <style:style style:name="T1" style:family="text">
      <style:text-properties fo:color="#1a3a5c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" style:family="text">
      <style:text-properties fo:color="#2e6da4" loext:opacity="100%" style:font-name="Arial" fo:font-size="10pt" style:font-name-asian="Arial2" style:font-size-asian="10pt" style:font-name-complex="Arial2" style:font-size-complex="10pt"/>
    </style:style>
    <style:style style:name="T3" style:family="text">
      <style:text-properties fo:color="#666666" loext:opacity="100%" style:font-name="Arial" fo:font-size="9pt" style:font-name-asian="Arial2" style:font-size-asian="9pt" style:font-name-complex="Arial2" style:font-size-complex="9pt"/>
    </style:style>
    <style:style style:name="T4" style:family="text">
      <style:text-properties fo:color="#2e6da4" loext:opacity="100%" style:font-name="Arial" fo:font-size="8pt" style:font-name-asian="Arial2" style:font-size-asian="8pt" style:font-name-complex="Arial2" style:font-size-complex="8pt"/>
    </style:style>
    <style:style style:name="T5" style:family="text">
      <style:text-properties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6" style:family="text">
      <style:text-properties style:font-name="Arial" fo:font-size="10.5pt" style:font-name-asian="Arial2" style:font-size-asian="10.5pt" style:font-name-complex="Arial2" style:font-size-complex="10.5pt"/>
    </style:style>
    <style:style style:name="T7" style:family="text">
      <style:text-properties fo:color="#ffffff" loext:opacity="100%" style:font-name="Arial" fo:font-size="8.5pt" fo:font-weight="bold" style:font-name-asian="Arial2" style:font-size-asian="8.5pt" style:font-weight-asian="bold" style:font-name-complex="Arial2" style:font-size-complex="8.5pt" style:font-weight-complex="bold"/>
    </style:style>
    <style:style style:name="T8" style:family="text">
      <style:text-properties style:font-name="Arial" fo:font-size="8.5pt" style:font-name-asian="Arial2" style:font-size-asian="8.5pt" style:font-name-complex="Arial2" style:font-size-complex="8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0.5pt" officeooo:rsid="001a8616" style:font-name-asian="Arial2" style:font-size-asian="10.5pt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pport Individuel — Annuaire des Startups et Incubateurs</text:span></text:p>
      <text:p text:style-name="P2"><text:span text:style-name="T2">ODD 9 — Industrie, innovation et infrastructure</text:span></text:p>
      <text:p text:style-name="P2"><text:span text:style-name="T3">Moussa Ndao — DAR26 — ESMT — Juin 2026</text:span></text:p>
      <text:p text:style-name="P3"><text:span text:style-name="T4">https://github.com/MoussaNdaodev/Annuaire_Startup</text:span></text:p>
      <text:p text:style-name="P4"><text:span text:style-name="T1">1. Présentation</text:span></text:p>
      <text:p text:style-name="P5"/>
      <text:p text:style-name="P6"><text:span text:style-name="T5">L'application </text:span><text:span text:style-name="T6">"Annuaire des Startups et Incubateurs" est un répertoire numérique développé avec Flutter qui recense des startups sénégalaises réelles. Elle offre un </text:span><text:span text:style-name="T5">CRUD complet</text:span><text:span text:style-name="T6"> (Créer, Lire, Modifier, Supprimer) avec recherche par </text:span><text:span text:style-name="T5">nom</text:span><text:span text:style-name="T6">, </text:span><text:span text:style-name="T5">filtrage par secteur d'activité </text:span><text:span text:style-name="T6">(Fintech, Agritech, Edtech, Autre) et </text:span><text:span text:style-name="T5">tri par année de création</text:span><text:span text:style-name="T6">. Les données sont persistées localement via </text:span><text:span text:style-name="T5">SharedPreferences.</text:span></text:p>
      <text:p text:style-name="P7"/>
      <text:p text:style-name="P6"><text:span text:style-name="T5">ODD 9</text:span><text:span text:style-name="T6"> — Industrie, innovation et infrastructure. En rendant visible l'écosystème startup sénégalais, l'application contribue à promouvoir l'innovation et le développement industriel local.</text:span></text:p>
      <text:p text:style-name="P7"/>
      <text:p text:style-name="P6"><text:span text:style-name="T5">Technologies utilisées</text:span><text:span text:style-name="T6"> : Flutter (Dart), Material 3, google_fonts (Inter), uuid, shared_preferences.</text:span></text:p>
      <text:p text:style-name="P4"><text:span text:style-name="T1">2. Données collectées</text:span></text:p>
      <text:p text:style-name="P5"/>
      <text:p text:style-name="P8"><text:span text:style-name="T5">5 startups sénégalaises </text:span><text:span text:style-name="T6"><text:s/>ont été collectées <text:s/>depuis www.digitalbusiness.africa</text:span><text:span text:style-name="T6"> :</text:span></text:p>
      <text:p text:style-name="P7"/>
      <table:table table:name="Tableau1" table:style-name="Tableau1">
        <table:table-column table:style-name="Tableau1.A" table:number-columns-repeated="4"/>
        <table:table-column table:style-name="Tableau1.E"/>
        <table:table-row table:style-name="Tableau1.1">
          <table:table-cell table:style-name="Tableau1.A1" office:value-type="string">
            <text:p text:style-name="P9"><text:span text:style-name="T7">Nom</text:span></text:p>
          </table:table-cell>
          <table:table-cell table:style-name="Tableau1.A1" office:value-type="string">
            <text:p text:style-name="P9"><text:span text:style-name="T7">Secteur</text:span></text:p>
          </table:table-cell>
          <table:table-cell table:style-name="Tableau1.A1" office:value-type="string">
            <text:p text:style-name="P9"><text:span text:style-name="T7">Ville</text:span></text:p>
          </table:table-cell>
          <table:table-cell table:style-name="Tableau1.A1" office:value-type="string">
            <text:p text:style-name="P9"><text:span text:style-name="T7">Année</text:span></text:p>
          </table:table-cell>
          <table:table-cell table:style-name="Tableau1.A1" office:value-type="string">
            <text:p text:style-name="P9"><text:span text:style-name="T7">Incubée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8">Wave</text:span></text:p>
          </table:table-cell>
          <table:table-cell table:style-name="Tableau1.A2" office:value-type="string">
            <text:p text:style-name="Standard"><text:span text:style-name="T8">Fintech</text:span></text:p>
          </table:table-cell>
          <table:table-cell table:style-name="Tableau1.A2" office:value-type="string">
            <text:p text:style-name="Standard"><text:span text:style-name="T8">Dakar</text:span></text:p>
          </table:table-cell>
          <table:table-cell table:style-name="Tableau1.A2" office:value-type="string">
            <text:p text:style-name="Standard"><text:span text:style-name="T8">2018</text:span></text:p>
          </table:table-cell>
          <table:table-cell table:style-name="Tableau1.A2" office:value-type="string">
            <text:p text:style-name="Standard"><text:span text:style-name="T8">Non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8">Mlouma</text:span></text:p>
          </table:table-cell>
          <table:table-cell table:style-name="Tableau1.A3" office:value-type="string">
            <text:p text:style-name="Standard"><text:span text:style-name="T8">Agritech</text:span></text:p>
          </table:table-cell>
          <table:table-cell table:style-name="Tableau1.A3" office:value-type="string">
            <text:p text:style-name="Standard"><text:span text:style-name="T8">Dakar</text:span></text:p>
          </table:table-cell>
          <table:table-cell table:style-name="Tableau1.A3" office:value-type="string">
            <text:p text:style-name="Standard"><text:span text:style-name="T8">2012</text:span></text:p>
          </table:table-cell>
          <table:table-cell table:style-name="Tableau1.A3" office:value-type="string">
            <text:p text:style-name="Standard"><text:span text:style-name="T8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8">Starlink</text:span></text:p>
          </table:table-cell>
          <table:table-cell table:style-name="Tableau1.A2" office:value-type="string">
            <text:p text:style-name="Standard"><text:span text:style-name="T8">Autre</text:span></text:p>
          </table:table-cell>
          <table:table-cell table:style-name="Tableau1.A2" office:value-type="string">
            <text:p text:style-name="Standard"><text:span text:style-name="T8">Dakar</text:span></text:p>
          </table:table-cell>
          <table:table-cell table:style-name="Tableau1.A2" office:value-type="string">
            <text:p text:style-name="Standard"><text:span text:style-name="T8">2026</text:span></text:p>
          </table:table-cell>
          <table:table-cell table:style-name="Tableau1.A2" office:value-type="string">
            <text:p text:style-name="Standard"><text:span text:style-name="T8">Non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8">Volkeno</text:span></text:p>
          </table:table-cell>
          <table:table-cell table:style-name="Tableau1.A3" office:value-type="string">
            <text:p text:style-name="Standard"><text:span text:style-name="T8">Autre</text:span></text:p>
          </table:table-cell>
          <table:table-cell table:style-name="Tableau1.A3" office:value-type="string">
            <text:p text:style-name="Standard"><text:span text:style-name="T8">Dakar</text:span></text:p>
          </table:table-cell>
          <table:table-cell table:style-name="Tableau1.A3" office:value-type="string">
            <text:p text:style-name="Standard"><text:span text:style-name="T8">2015</text:span></text:p>
          </table:table-cell>
          <table:table-cell table:style-name="Tableau1.A3" office:value-type="string">
            <text:p text:style-name="Standard"><text:span text:style-name="T8">Oui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8">PayDunya</text:span></text:p>
          </table:table-cell>
          <table:table-cell table:style-name="Tableau1.A2" office:value-type="string">
            <text:p text:style-name="Standard"><text:span text:style-name="T8">Fintech</text:span></text:p>
          </table:table-cell>
          <table:table-cell table:style-name="Tableau1.A2" office:value-type="string">
            <text:p text:style-name="Standard"><text:span text:style-name="T8">Dakar</text:span></text:p>
          </table:table-cell>
          <table:table-cell table:style-name="Tableau1.A2" office:value-type="string">
            <text:p text:style-name="Standard"><text:span text:style-name="T8">2016</text:span></text:p>
          </table:table-cell>
          <table:table-cell table:style-name="Tableau1.A2" office:value-type="string">
            <text:p text:style-name="Standard"><text:span text:style-name="T8">Non</text:span></text:p>
          </table:table-cell>
        </table:table-row>
      </table:table>
      <text:p text:style-name="P4"><text:span text:style-name="T1">3. Modèle de données</text:span></text:p>
      <text:p text:style-name="P5"/>
      <text:p text:style-name="P8"><text:span text:style-name="T5">Classe Startup</text:span><text:span text:style-name="T6"> (l</text:span><text:span text:style-name="T5">ib/models/startup.dart</text:span><text:span text:style-name="T6">) :</text:span></text:p>
      <text:p text:style-name="P10">7 champs typés :</text:p>
      <text:p text:style-name="P6"><text:span text:style-name="T5">id</text:span><text:span text:style-name="T6"> (String, UUID v4), </text:span></text:p>
      <text:p text:style-name="P6"><text:span text:style-name="T5">nom</text:span><text:span text:style-name="T6"> (String), </text:span></text:p>
      <text:p text:style-name="P6"><text:span text:style-name="T5">secteur</text:span><text:span text:style-name="T6"> (enum Sector), </text:span></text:p>
      <text:p text:style-name="P6"><text:span text:style-name="T5">ville</text:span><text:span text:style-name="T6"> (String), </text:span></text:p>
      <text:p text:style-name="P6"><text:span text:style-name="T5">anneeCreation</text:span><text:span text:style-name="T6"> (int), </text:span></text:p>
      <text:p text:style-name="P6"><text:span text:style-name="T5">incubee</text:span><text:span text:style-name="T6"> (bool, défaut false), </text:span></text:p>
      <text:p text:style-name="P6"><text:span text:style-name="T5">description</text:span><text:span text:style-name="T6"> (String?, nullable).</text:span></text:p>
      <text:p text:style-name="P7"/>
      <text:p text:style-name="P8"><text:span text:style-name="T5">Enum Sector</text:span><text:span text:style-name="T6"> (</text:span><text:span text:style-name="T5">lib/enums/startup_enums.dart</text:span><text:span text:style-name="T6">) :</text:span></text:p>
      <text:p text:style-name="P10">fintech (💳 bleu), agritech (🌱 vert), edtech (📚 violet), other (🚀 orange). Chaque valeur possède un label français, un emoji et une couleur associée.</text:p>
      <text:p text:style-name="P7"/>
      <text:p text:style-name="P6"><text:span text:style-name="T5">Propriétés et méthodes</text:span><text:span text:style-name="T6"> : getter calculé </text:span><text:span text:style-name="T5">age</text:span><text:span text:style-name="T6">, méthodes</text:span><text:span text:style-name="T5"> toJson()/fromJson()</text:span><text:span text:style-name="T6"> pour la sérialisation, </text:span><text:span text:style-name="T5">copyWith()</text:span><text:span text:style-name="T6"> pour la modification par copie.</text:span></text:p>
      <text:p text:style-name="P4"><text:soft-page-break/><text:span text:style-name="T1">4. StatelessWidget / StatefulWidget</text:span></text:p>
      <text:p text:style-name="P5"/>
      <text:p text:style-name="P11">StatefulWidget :</text:p>
      <text:p text:style-name="P12"/>
      <text:p text:style-name="P6"><text:span text:style-name="T5">StartupListScreen</text:span><text:span text:style-name="T6"> (</text:span><text:span text:style-name="T5">lib/screens/startup_list_screen.dart)</text:span><text:span text:style-name="T6"> : gère trois états (_selectedSector, _sortAscending, _searchQuery). </text:span></text:p>
      <text:p text:style-name="P6"><text:span text:style-name="T5">setState()</text:span><text:span text:style-name="T6"> est appelé dans trois contextes : via </text:span><text:span text:style-name="T5">_onDataChanged()</text:span><text:span text:style-name="T6"> lors des notifications du repository, via le </text:span><text:span text:style-name="T5">TextField</text:span><text:span text:style-name="T6"> de recherche <text:s/>à chaque saisie, et via les</text:span><text:span text:style-name="T5"> filtres/tri</text:span><text:span text:style-name="T6"> pour mettre à jour l'affichage.</text:span></text:p>
      <text:p text:style-name="P7"/>
      <text:p text:style-name="P12"><text:span text:style-name="T9">StatelessWidget :</text:span> </text:p>
      <text:p text:style-name="P12"/>
      <text:p text:style-name="P6"><text:span text:style-name="T5">SectorTag</text:span><text:span text:style-name="T6"> (lib/widgets/sector_tag.dart) : widget d'affichage pur. Reçoit ses données via le constructeur, ne gère aucun état. Même principe pour </text:span><text:span text:style-name="T5">StartupCard</text:span><text:span text:style-name="T6">, </text:span><text:span text:style-name="T5">IncubatedBadge</text:span><text:span text:style-name="T6">, </text:span><text:span text:style-name="T5">StatsHeader</text:span><text:span text:style-name="T6">.</text:span></text:p>
      <text:p text:style-name="P4"><text:span text:style-name="T1">5. CRUD</text:span></text:p>
      <text:p text:style-name="P5"/>
      <text:p text:style-name="P6"><text:span text:style-name="T5">Create</text:span><text:span text:style-name="T6"> — StartupFormScreen (</text:span><text:span text:style-name="T5">lib/screens/startup_form_screen.dart</text:span><text:span text:style-name="T6">). Validation via </text:span></text:p>
      <text:p text:style-name="P6"><text:span text:style-name="T5">GlobalKey&lt;FormState&gt;</text:span><text:span text:style-name="T6"> : nom </text:span><text:span text:style-name="T5">requis</text:span><text:span text:style-name="T6"> , ville </text:span><text:span text:style-name="T5">requise</text:span><text:span text:style-name="T6">, secteur </text:span><text:span text:style-name="T5">requis</text:span><text:span text:style-name="T6"> (</text:span><text:span text:style-name="T5">DropdownButtonFormField</text:span><text:span text:style-name="T6">), année requise (</text:span><text:span text:style-name="T5">1900 - année courante</text:span><text:span text:style-name="T6">), description </text:span><text:span text:style-name="T5">optionnelle</text:span><text:span text:style-name="T6"> (max 500). Appel à </text:span><text:span text:style-name="T5">repository.add(</text:span><text:span text:style-name="T6">), </text:span><text:span text:style-name="T5">SnackBar de confirmation</text:span><text:span text:style-name="T6">.</text:span></text:p>
      <text:p text:style-name="P7"/>
      <text:p text:style-name="P6"><text:span text:style-name="T5">Update</text:span><text:span text:style-name="T6"> — Depuis </text:span><text:span text:style-name="T5">StartupDetailScreen</text:span><text:span text:style-name="T6"> (</text:span><text:span text:style-name="T5">lib/screens/startup_detail_screen.dart</text:span><text:span text:style-name="T6">), bouton d'édition → formulaire pré-rempli avec l'objet </text:span></text:p>
      <text:p text:style-name="P6"><text:span text:style-name="T5">Startup</text:span><text:span text:style-name="T6"> passé en argument. Appel à repository.up</text:span><text:span text:style-name="T10">a</text:span><text:span text:style-name="T6">date().</text:span></text:p>
      <text:p text:style-name="P7"/>
      <text:p text:style-name="P6"><text:span text:style-name="T5">Delete</text:span><text:span text:style-name="T6"> — Dialogue </text:span><text:span text:style-name="T5">ConfirmationDialog</text:span><text:span text:style-name="T6"> (</text:span><text:span text:style-name="T5">lib/widgets/confirmation_dialog.dart</text:span><text:span text:style-name="T6">) avant suppression (startup_detail_screen.dart). Deux actions : </text:span><text:span text:style-name="T5">Annuler (gris)</text:span><text:span text:style-name="T6"> ou </text:span><text:span text:style-name="T5">Supprimer (rouge)</text:span><text:span text:style-name="T6">. Appel à </text:span><text:span text:style-name="T5">repository.remove()</text:span><text:span text:style-name="T6"> après confirmation.</text:span></text:p>
      <text:p text:style-name="P7"/>
      <text:p text:style-name="P6"><text:span text:style-name="T5">StartupRepository</text:span><text:span text:style-name="T6"> (</text:span><text:span text:style-name="T5">lib/data/startup_repository.dart</text:span><text:span text:style-name="T6">) : hérite de </text:span><text:span text:style-name="T5">ChangeNotifier</text:span><text:span text:style-name="T6">, persistance via </text:span><text:span text:style-name="T5">SharedPreferences</text:span><text:span text:style-name="T6"> (sérialisation JSON).</text:span></text:p>
      <text:p text:style-name="P4"><text:span text:style-name="T1">6. Routage</text:span></text:p>
      <text:p text:style-name="P5"/>
      <text:p text:style-name="P6"><text:span text:style-name="T5">onGenerateRoute</text:span><text:span text:style-name="T6"> avec 4 routes nommées (</text:span><text:span text:style-name="T5">lib/routes/app_router.dart</text:span><text:span text:style-name="T6">) :</text:span></text:p>
      <text:p text:style-name="P7"/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9"><text:span text:style-name="T7">Route</text:span></text:p>
          </table:table-cell>
          <table:table-cell table:style-name="Tableau2.A1" office:value-type="string">
            <text:p text:style-name="P9"><text:span text:style-name="T7">Écran</text:span></text:p>
          </table:table-cell>
          <table:table-cell table:style-name="Tableau2.A1" office:value-type="string">
            <text:p text:style-name="P9"><text:span text:style-name="T7">Arguments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8">/</text:span></text:p>
          </table:table-cell>
          <table:table-cell table:style-name="Tableau2.A2" office:value-type="string">
            <text:p text:style-name="Standard"><text:span text:style-name="T8">StartupListScreen</text:span></text:p>
          </table:table-cell>
          <table:table-cell table:style-name="Tableau2.A2" office:value-type="string">
            <text:p text:style-name="Standard"><text:span text:style-name="T8">Aucun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8">/detail</text:span></text:p>
          </table:table-cell>
          <table:table-cell table:style-name="Tableau2.A3" office:value-type="string">
            <text:p text:style-name="Standard"><text:span text:style-name="T8">StartupDetailScreen</text:span></text:p>
          </table:table-cell>
          <table:table-cell table:style-name="Tableau2.A3" office:value-type="string">
            <text:p text:style-name="Standard"><text:span text:style-name="T8">Objet Startup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8">/form</text:span></text:p>
          </table:table-cell>
          <table:table-cell table:style-name="Tableau2.A2" office:value-type="string">
            <text:p text:style-name="Standard"><text:span text:style-name="T8">StartupFormScreen</text:span></text:p>
          </table:table-cell>
          <table:table-cell table:style-name="Tableau2.A2" office:value-type="string">
            <text:p text:style-name="Standard"><text:span text:style-name="T8">Startup? (nullable)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8">/about</text:span></text:p>
          </table:table-cell>
          <table:table-cell table:style-name="Tableau2.A3" office:value-type="string">
            <text:p text:style-name="Standard"><text:span text:style-name="T8">AboutScreen</text:span></text:p>
          </table:table-cell>
          <table:table-cell table:style-name="Tableau2.A3" office:value-type="string">
            <text:p text:style-name="Standard"><text:span text:style-name="T8">Aucun</text:span></text:p>
          </table:table-cell>
        </table:table-row>
      </table:table>
      <text:p text:style-name="P7"/>
      <text:p text:style-name="P6"><text:span text:style-name="T5">Passage d'arguments</text:span><text:span text:style-name="T6"> : </text:span></text:p>
      <text:p text:style-name="P6"><text:span text:style-name="T5">Navigator.pushNamed(context, AppRouter.detail, arguments: startup)</text:span></text:p>
      <text:p text:style-name="P6"><text:span text:style-name="T5">Récupération</text:span><text:span text:style-name="T6"> : settings.arguments as Startup. Pour le formulaire, Startup? distingue ajout vs modification.</text:span></text:p>
      <text:p text:style-name="P4"><text:soft-page-break/><text:span text:style-name="T1">7. Personnalisation de l'interface</text:span></text:p>
      <text:p text:style-name="P5"/>
      <text:p text:style-name="P6"><text:span text:style-name="T5">ThemeData Material 3</text:span><text:span text:style-name="T6"> (lib/theme/app_theme.dart) : ColorScheme personnalisé — primaire bleu #2D9CDB, secondaire orange #F2994A, fond #F8F9FA. Police </text:span><text:span text:style-name="T5">Inter</text:span><text:span text:style-name="T6"> via Google Fonts sur toute la hiérarchie typographique.</text:span></text:p>
      <text:p text:style-name="P13"/>
      <text:p text:style-name="P6"><text:span text:style-name="T5">Widgets réutilisables</text:span><text:span text:style-name="T6"> : </text:span></text:p>
      <text:p text:style-name="P6"><text:span text:style-name="T5">StartupCard</text:span><text:span text:style-name="T6"> (carte startup avec emoji, nom, ville, année), </text:span></text:p>
      <text:p text:style-name="P6"><text:span text:style-name="T5">SectorTag</text:span><text:span text:style-name="T6"> (badge secteur coloré), </text:span></text:p>
      <text:p text:style-name="P6"><text:span text:style-name="T5">IncubatedBadge</text:span><text:span text:style-name="T6"> (badge vert "Incubée"), </text:span></text:p>
      <text:p text:style-name="P6"><text:span text:style-name="T5">StatsHeader</text:span><text:span text:style-name="T6"> (statistiques total + répartition), </text:span></text:p>
      <text:p text:style-name="P6"><text:span text:style-name="T5">EmptyStateWidget</text:span><text:span text:style-name="T6"> (état vide), </text:span></text:p>
      <text:p text:style-name="P6"><text:span text:style-name="T5">ConfirmationDialog</text:span><text:span text:style-name="T6"> (dialogue suppression).</text:span></text:p>
      <text:p text:style-name="P4"><text:span text:style-name="T1">8. Difficulté rencontrée</text:span></text:p>
      <text:p text:style-name="P5"/>
      <text:p text:style-name="P6"><text:span text:style-name="T5">Filtres combinés</text:span><text:span text:style-name="T6"> : faire fonctionner simultanément recherche par nom, filtre par secteur et tri par année sans conflit.</text:span></text:p>
      <text:p text:style-name="P6"><text:span text:style-name="T5">Solution</text:span><text:span text:style-name="T6"> : propriété get </text:span></text:p>
      <text:p text:style-name="P6"><text:span text:style-name="T5">_filteredAndSortedStartups</text:span><text:span text:style-name="T6"> (startup_list_screen.dart:48-52) qui chaîne les trois opérations séquentiellement : recherche textuelle → filtre secteur → tri par année. Chaque modification déclenche </text:span></text:p>
      <text:p text:style-name="P6"><text:span text:style-name="T5">setState()</text:span><text:span text:style-name="T6"> qui réévalue la chaîne complète.</text:span></text:p>
      <text:p text:style-name="P4"><text:span text:style-name="T1">9. Captures d'écran</text:span></text:p>
      <text:p text:style-name="P5"/>
      <text:p text:style-name="P6"><text:span text:style-name="T5">Les captures</text:span><text:span text:style-name="T6"> des six écrans (accueil, détail, formulaire ajout, formulaire modification, dialogue suppression, filtre secteur) sont disponibles dans le dossier captures/ du projet et sur le dépôt GitHub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fr" fo:country="SN" style:letter-kerning="false" style:font-name-asian="Arial2" style:font-size-asian="10.5pt" style:language-asian="zh" style:country-asian="CN" style:font-name-complex="Arial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fr" fo:country="SN" style:letter-kerning="false" style:font-name-asian="Arial2" style:font-size-asian="10.5pt" style:language-asian="zh" style:country-asian="CN" style:font-name-complex="Arial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53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cccccc"/>
    </style:style>
    <style:style style:name="MP2" style:family="paragraph" style:parent-style-name="Standard">
      <style:paragraph-properties fo:margin-top="0.053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cccccc" fo:border-bottom="none"/>
    </style:style>
    <style:style style:name="MT1" style:family="text">
      <style:text-properties fo:color="#999999" loext:opacity="100%" style:font-name="Arial" fo:font-size="7pt" style:font-name-asian="Arial2" style:font-size-asian="7pt" style:font-name-complex="Arial2" style:font-size-complex="7pt"/>
    </style:style>
    <style:style style:name="MT2" style:family="text">
      <style:text-properties style:font-name="Arial" fo:font-size="10.5pt" style:font-name-asian="Arial2" style:font-size-asian="10.5pt" style:font-name-complex="Arial2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nnuaire Startups - Flutter | Moussa NDAO - DAR26 - ESMT 2026</text:span></text:p>
      </style:header>
      <style:footer>
        <text:p text:style-name="MP2"><text:span text:style-name="MT1">Page </text:span><text:span text:style-name="MT2"><text:page-number text:select-page="current">3</text:page-number></text:span><text:span text:style-name="MT1"><text:s/>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6-11T13:19:03.229000000</meta:creation-date>
    <dc:date>2026-06-11T14:32:55.778709400</dc:date>
    <meta:print-date>2026-06-11T13:36:30.451264000</meta:print-date>
    <meta:editing-duration>PT6M14S</meta:editing-duration>
    <meta:document-statistic meta:table-count="2" meta:image-count="0" meta:object-count="0" meta:page-count="3" meta:paragraph-count="104" meta:word-count="584" meta:character-count="4784" meta:non-whitespace-character-count="4272"/>
    <meta:generator>LibreOffice/26.2.3.2$Windows_X86_64 LibreOffice_project/70e089b17412e4cb7773e41413306b17a2328c34</meta:generator>
  </office:meta>
</office:document-meta>
</file>